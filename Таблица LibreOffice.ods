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6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3.946cm"/>
    </style:style>
    <style:style style:name="co5" style:family="table-column">
      <style:table-column-properties fo:break-before="auto" style:column-width="3.967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3.5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425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2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Лист3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Лист4" table:style-name="ta1">
        <table:table-column table:style-name="co2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Максимальный показатель</text:p>
          </table:table-cell>
          <table:table-cell office:value-type="string" calcext:value-type="string">
            <text:p>Сумм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/>
        </table:table-row>
      </table:table>
      <table:table table:name="Лист1" table:style-name="ta1">
        <table:table-column table:style-name="co3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Максимальный показатель</text:p>
          </table:table-cell>
          <table:table-cell office:value-type="string" calcext:value-type="string">
            <text:p>Сумм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23" calcext:value-type="float">
            <text:p>10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095" calcext:value-type="float">
            <text:p>409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191" calcext:value-type="float">
            <text:p>819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383" calcext:value-type="float">
            <text:p>1638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1071" calcext:value-type="float">
            <text:p>13107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62143" calcext:value-type="float">
            <text:p>26214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24287" calcext:value-type="float">
            <text:p>52428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48575" calcext:value-type="float">
            <text:p>104857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97151" calcext:value-type="float">
            <text:p>209715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94303" calcext:value-type="float">
            <text:p>419430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388607" calcext:value-type="float">
            <text:p>838860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777215" calcext:value-type="float">
            <text:p>16777215</text:p>
          </table:table-cell>
        </table:table-row>
      </table:table>
      <table:table table:name="Лист 2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Максимальный показатель</text:p>
          </table:table-cell>
          <table:table-cell office:value-type="string" calcext:value-type="string">
            <text:p>Сумм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841" calcext:value-type="float">
            <text:p>98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524" calcext:value-type="float">
            <text:p>295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8573" calcext:value-type="float">
            <text:p>885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65720" calcext:value-type="float">
            <text:p>2657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97161" calcext:value-type="float">
            <text:p>797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91484" calcext:value-type="float">
            <text:p>23914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174453" calcext:value-type="float">
            <text:p>71744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523360" calcext:value-type="float">
            <text:p>215233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4570081" calcext:value-type="float">
            <text:p>645700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3710244" calcext:value-type="float">
            <text:p>1937102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81130733" calcext:value-type="float">
            <text:p>5811307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43392200" calcext:value-type="float">
            <text:p>1743392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230176601" calcext:value-type="float">
            <text:p>52301766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690529804" calcext:value-type="float">
            <text:p>156905298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7071589413" calcext:value-type="float">
            <text:p>470715894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41214768240" calcext:value-type="float">
            <text:p>141214768240</text:p>
          </table:table-cell>
        </table:table-row>
      </table:table>
      <table:table table:name="Лист 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Максимальный показатель</text:p>
          </table:table-cell>
          <table:table-cell office:value-type="string" calcext:value-type="string">
            <text:p>Сумма для 2</text:p>
          </table:table-cell>
          <table:table-cell office:value-type="string" calcext:value-type="string">
            <text:p>Сумма для 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office:value-type="float" office:value="9841" calcext:value-type="float">
            <text:p>98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23" calcext:value-type="float">
            <text:p>1023</text:p>
          </table:table-cell>
          <table:table-cell office:value-type="float" office:value="29524" calcext:value-type="float">
            <text:p>295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7" calcext:value-type="float">
            <text:p>2047</text:p>
          </table:table-cell>
          <table:table-cell office:value-type="float" office:value="88573" calcext:value-type="float">
            <text:p>885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095" calcext:value-type="float">
            <text:p>4095</text:p>
          </table:table-cell>
          <table:table-cell office:value-type="float" office:value="265720" calcext:value-type="float">
            <text:p>2657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191" calcext:value-type="float">
            <text:p>8191</text:p>
          </table:table-cell>
          <table:table-cell office:value-type="float" office:value="797161" calcext:value-type="float">
            <text:p>797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383" calcext:value-type="float">
            <text:p>16383</text:p>
          </table:table-cell>
          <table:table-cell office:value-type="float" office:value="2391484" calcext:value-type="float">
            <text:p>23914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767" calcext:value-type="float">
            <text:p>32767</text:p>
          </table:table-cell>
          <table:table-cell office:value-type="float" office:value="7174453" calcext:value-type="float">
            <text:p>71744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5535" calcext:value-type="float">
            <text:p>65535</text:p>
          </table:table-cell>
          <table:table-cell office:value-type="float" office:value="21523360" calcext:value-type="float">
            <text:p>215233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1071" calcext:value-type="float">
            <text:p>131071</text:p>
          </table:table-cell>
          <table:table-cell office:value-type="float" office:value="64570081" calcext:value-type="float">
            <text:p>645700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62143" calcext:value-type="float">
            <text:p>262143</text:p>
          </table:table-cell>
          <table:table-cell office:value-type="float" office:value="193710244" calcext:value-type="float">
            <text:p>1937102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24287" calcext:value-type="float">
            <text:p>524287</text:p>
          </table:table-cell>
          <table:table-cell office:value-type="float" office:value="581130733" calcext:value-type="float">
            <text:p>5811307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48575" calcext:value-type="float">
            <text:p>1048575</text:p>
          </table:table-cell>
          <table:table-cell office:value-type="float" office:value="1743392200" calcext:value-type="float">
            <text:p>1743392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97151" calcext:value-type="float">
            <text:p>2097151</text:p>
          </table:table-cell>
          <table:table-cell office:value-type="float" office:value="5230176601" calcext:value-type="float">
            <text:p>52301766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94303" calcext:value-type="float">
            <text:p>4194303</text:p>
          </table:table-cell>
          <table:table-cell office:value-type="float" office:value="15690529804" calcext:value-type="float">
            <text:p>156905298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7071589413" calcext:value-type="float">
            <text:p>470715894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141214768240" calcext:value-type="float">
            <text:p>141214768240</text:p>
          </table:table-cell>
        </table:table-row>
      </table:table>
      <table:table table:name="Лист 4" table:style-name="ta1">
        <table:table-column table:style-name="co7" table:default-cell-style-name="Default"/>
        <table:table-column table:style-name="co1" table:number-columns-repeated="3" table:default-cell-style-name="Default"/>
        <table:table-row table:style-name="ro4">
          <table:table-cell table:style-name="ce1" office:value-type="string" calcext:value-type="string">
            <text:p>Статистическая функция</text:p>
          </table:table-cell>
          <table:table-cell table:style-name="ce1" office:value-type="string" calcext:value-type="string">
            <text:p>Для А (Лист 3)</text:p>
          </table:table-cell>
          <table:table-cell table:style-name="ce1" office:value-type="string" calcext:value-type="string">
            <text:p>Для В (Лист 3)</text:p>
          </table:table-cell>
          <table:table-cell table:style-name="ce1" office:value-type="string" calcext:value-type="string">
            <text:p>Для С (Лист 3)</text:p>
          </table:table-cell>
        </table:table-row>
        <table:table-row table:style-name="ro3">
          <table:table-cell office:value-type="string" calcext:value-type="string">
            <text:p>среднее значение</text:p>
          </table:table-cell>
          <table:table-cell office:value-type="float" office:value="11.5" calcext:value-type="float">
            <text:p>11,5</text:p>
          </table:table-cell>
          <table:table-cell office:value-type="float" office:value="1398100.25" calcext:value-type="float">
            <text:p>1398100,25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максимальное значение</text:p>
          </table:table-cell>
          <table:table-cell office:value-type="float" office:value="23" calcext:value-type="float">
            <text:p>23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минимальное значение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едиана</text:p>
          </table:table-cell>
          <table:table-cell office:value-type="float" office:value="11.5" calcext:value-type="float">
            <text:p>11,5</text:p>
          </table:table-cell>
          <table:table-cell office:value-type="float" office:value="6143" calcext:value-type="float">
            <text:p>6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ода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исперсия</text:p>
          </table:table-cell>
          <table:table-cell table:number-columns-repeated="3"/>
        </table:table-row>
      </table:table>
      <table:table table:name="Лист 5" table:style-name="ta1">
        <table:shapes>
          <draw:frame draw:z-index="0" draw:style-name="gr1" draw:text-style-name="P1" svg:width="15.849cm" svg:height="9.009cm" svg:x="4.471cm" svg:y="4.47cm">
            <draw:object draw:notify-on-update-of-ranges="'Лист 5'.A1:'Лист 5'.A5 'Лист 5'.B1:'Лист 5'.B5 'Лист 5'.C1:'Лист 5'.C5 'Лист 5'.D1:'Лист 5'.D5 'Лист 5'.E1:'Лист 5'.E5 'Лист 5'.F1:'Лист 5'.F5 'Лист 5'.G1:'Лист 5'.G5 'Лист 5'.H1:'Лист 5'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Колледж 1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2236476" calcext:value-type="float">
            <text:p>2236476</text:p>
          </table:table-cell>
          <table:table-cell office:value-type="float" office:value="1934765" calcext:value-type="float">
            <text:p>1934765</text:p>
          </table:table-cell>
          <table:table-cell office:value-type="float" office:value="4543534" calcext:value-type="float">
            <text:p>4543534</text:p>
          </table:table-cell>
          <table:table-cell office:value-type="float" office:value="2348887" calcext:value-type="float">
            <text:p>2348887</text:p>
          </table:table-cell>
          <table:table-cell office:value-type="float" office:value="1170004" calcext:value-type="float">
            <text:p>1170004</text:p>
          </table:table-cell>
          <table:table-cell office:value-type="float" office:value="2344598" calcext:value-type="float">
            <text:p>2344598</text:p>
          </table:table-cell>
        </table:table-row>
        <table:table-row table:style-name="ro1">
          <table:table-cell office:value-type="string" calcext:value-type="string">
            <text:p>Колледж 2</text:p>
          </table:table-cell>
          <table:table-cell office:value-type="float" office:value="237800" calcext:value-type="float">
            <text:p>237800</text:p>
          </table:table-cell>
          <table:table-cell office:value-type="float" office:value="732647" calcext:value-type="float">
            <text:p>732647</text:p>
          </table:table-cell>
          <table:table-cell office:value-type="float" office:value="567672" calcext:value-type="float">
            <text:p>567672</text:p>
          </table:table-cell>
          <table:table-cell office:value-type="float" office:value="234234" calcext:value-type="float">
            <text:p>234234</text:p>
          </table:table-cell>
          <table:table-cell office:value-type="float" office:value="323217" calcext:value-type="float">
            <text:p>323217</text:p>
          </table:table-cell>
          <table:table-cell office:value-type="float" office:value="634423" calcext:value-type="float">
            <text:p>634423</text:p>
          </table:table-cell>
          <table:table-cell office:value-type="float" office:value="235455" calcext:value-type="float">
            <text:p>235455</text:p>
          </table:table-cell>
        </table:table-row>
        <table:table-row table:style-name="ro1">
          <table:table-cell office:value-type="string" calcext:value-type="string">
            <text:p>Колледж 3</text:p>
          </table:table-cell>
          <table:table-cell office:value-type="float" office:value="3211400" calcext:value-type="float">
            <text:p>3211400</text:p>
          </table:table-cell>
          <table:table-cell office:value-type="float" office:value="4873837" calcext:value-type="float">
            <text:p>4873837</text:p>
          </table:table-cell>
          <table:table-cell office:value-type="float" office:value="3654654" calcext:value-type="float">
            <text:p>3654654</text:p>
          </table:table-cell>
          <table:table-cell office:value-type="float" office:value="3453453" calcext:value-type="float">
            <text:p>3453453</text:p>
          </table:table-cell>
          <table:table-cell office:value-type="float" office:value="5435323" calcext:value-type="float">
            <text:p>5435323</text:p>
          </table:table-cell>
          <table:table-cell office:value-type="float" office:value="4586959" calcext:value-type="float">
            <text:p>4586959</text:p>
          </table:table-cell>
          <table:table-cell office:value-type="float" office:value="8576885" calcext:value-type="float">
            <text:p>8576885</text:p>
          </table:table-cell>
        </table:table-row>
        <table:table-row table:style-name="ro1">
          <table:table-cell office:value-type="string" calcext:value-type="string">
            <text:p>Колледж 4</text:p>
          </table:table-cell>
          <table:table-cell office:value-type="float" office:value="4961201" calcext:value-type="float">
            <text:p>4961201</text:p>
          </table:table-cell>
          <table:table-cell office:value-type="float" office:value="7844962" calcext:value-type="float">
            <text:p>7844962</text:p>
          </table:table-cell>
          <table:table-cell office:value-type="float" office:value="6159094" calcext:value-type="float">
            <text:p>6159094</text:p>
          </table:table-cell>
          <table:table-cell office:value-type="float" office:value="8233225" calcext:value-type="float">
            <text:p>8233225</text:p>
          </table:table-cell>
          <table:table-cell office:value-type="float" office:value="8109432" calcext:value-type="float">
            <text:p>8109432</text:p>
          </table:table-cell>
          <table:table-cell office:value-type="float" office:value="6393392" calcext:value-type="float">
            <text:p>6393392</text:p>
          </table:table-cell>
          <table:table-cell office:value-type="float" office:value="11158945" calcext:value-type="float">
            <text:p>11158945</text:p>
          </table:table-cell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.00.0000</text:date>, <text:time style:data-style-name="N2" text:time-value="10:41:56.30801605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2:45:26.447054398</meta:creation-date>
    <dc:title>Таблица</dc:title>
    <meta:generator>LibreOffice/7.6.7.2$Linux_X86_64 LibreOffice_project/60$Build-2</meta:generator>
    <meta:editing-duration>PT2H27M8S</meta:editing-duration>
    <meta:editing-cycles>6</meta:editing-cycles>
    <dc:date>2026-05-18T12:04:12.153120656</dc:date>
    <meta:document-statistic meta:table-count="8" meta:cell-count="364" meta:object-count="1"/>
    <meta:template xlink:type="simple" xlink:actuate="onRequest" xlink:title="Таблица" xlink:href="../../../../usr/lib/libreoffice/share/template/common/ШАБЛОН_ЭЛЕКТРОННОЙ_ТАБЛИЦЫ_2019-07-22.ots" meta:date="2025-11-28T12:45:26.52367212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5cm" svg:height="9.01cm" xlink:href=".." xlink:type="simple" chart:class="chart:line" chart:style-name="ch1">
        <chart:legend chart:legend-position="end" svg:x="12.786cm" svg:y="2.712cm" style:legend-expansion="high" chart:style-name="ch2"/>
        <chart:plot-area chart:style-name="ch3" table:cell-range-address="'Лист 5'.A1:'Лист 5'.H5" chart:data-source-has-labels="column" svg:x="0.317cm" svg:y="0.18cm" svg:width="12.152cm" svg:height="8.65cm">
          <chart:coordinate-region svg:x="2.05cm" svg:y="0.38cm" svg:width="9.544cm" svg:height="7.803cm"/>
          <chart:axis chart:dimension="x" chart:name="primary-x" chart:style-name="ch4" chartooo:axis-type="auto">
            <chartooo:date-scale/>
            <chart:categories table:cell-range-address="'Лист 5'.A1:'Лист 5'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Лист 5'.B1:'Лист 5'.B5" chart:class="chart:line">
            <chart:data-point chart:repeated="5"/>
          </chart:series>
          <chart:series chart:style-name="ch7" chart:values-cell-range-address="'Лист 5'.C1:'Лист 5'.C5" chart:class="chart:line">
            <chart:data-point chart:repeated="5"/>
          </chart:series>
          <chart:series chart:style-name="ch8" chart:values-cell-range-address="'Лист 5'.D1:'Лист 5'.D5" chart:class="chart:line">
            <chart:data-point chart:repeated="5"/>
          </chart:series>
          <chart:series chart:style-name="ch9" chart:values-cell-range-address="'Лист 5'.E1:'Лист 5'.E5" chart:class="chart:line">
            <chart:data-point chart:repeated="5"/>
          </chart:series>
          <chart:series chart:style-name="ch10" chart:values-cell-range-address="'Лист 5'.F1:'Лист 5'.F5" chart:class="chart:line">
            <chart:data-point chart:repeated="5"/>
          </chart:series>
          <chart:series chart:style-name="ch11" chart:values-cell-range-address="'Лист 5'.G1:'Лист 5'.G5" chart:class="chart:line">
            <chart:data-point chart:repeated="5"/>
          </chart:series>
          <chart:series chart:style-name="ch12" chart:values-cell-range-address="'Лист 5'.H1:'Лист 5'.H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Лист 5'.A1:'Лист 5'.A5</svg:desc>
                </draw:g>
              </table:table-cell>
              <table:table-cell office:value-type="float" office:value="2021">
                <text:p>2021</text:p>
                <draw:g>
                  <svg:desc>'Лист 5'.B1:'Лист 5'.B5</svg:desc>
                </draw:g>
              </table:table-cell>
              <table:table-cell office:value-type="float" office:value="2022">
                <text:p>2022</text:p>
                <draw:g>
                  <svg:desc>'Лист 5'.C1:'Лист 5'.C5</svg:desc>
                </draw:g>
              </table:table-cell>
              <table:table-cell office:value-type="float" office:value="2023">
                <text:p>2023</text:p>
                <draw:g>
                  <svg:desc>'Лист 5'.D1:'Лист 5'.D5</svg:desc>
                </draw:g>
              </table:table-cell>
              <table:table-cell office:value-type="float" office:value="2024">
                <text:p>2024</text:p>
                <draw:g>
                  <svg:desc>'Лист 5'.E1:'Лист 5'.E5</svg:desc>
                </draw:g>
              </table:table-cell>
              <table:table-cell office:value-type="float" office:value="2025">
                <text:p>2025</text:p>
                <draw:g>
                  <svg:desc>'Лист 5'.F1:'Лист 5'.F5</svg:desc>
                </draw:g>
              </table:table-cell>
              <table:table-cell office:value-type="float" office:value="2026">
                <text:p>2026</text:p>
                <draw:g>
                  <svg:desc>'Лист 5'.G1:'Лист 5'.G5</svg:desc>
                </draw:g>
              </table:table-cell>
              <table:table-cell office:value-type="float" office:value="2027">
                <text:p>2027</text:p>
                <draw:g>
                  <svg:desc>'Лист 5'.H1:'Лист 5'.H5</svg:desc>
                </draw:g>
              </table:table-cell>
            </table:table-row>
            <table:table-row>
              <table:table-cell office:value-type="string">
                <text:p>Колледж 1</text:p>
              </table:table-cell>
              <table:table-cell office:value-type="float" office:value="1510000">
                <text:p>1510000</text:p>
              </table:table-cell>
              <table:table-cell office:value-type="float" office:value="2236476">
                <text:p>2236476</text:p>
              </table:table-cell>
              <table:table-cell office:value-type="float" office:value="1934765">
                <text:p>1934765</text:p>
              </table:table-cell>
              <table:table-cell office:value-type="float" office:value="4543534">
                <text:p>4543534</text:p>
              </table:table-cell>
              <table:table-cell office:value-type="float" office:value="2348887">
                <text:p>2348887</text:p>
              </table:table-cell>
              <table:table-cell office:value-type="float" office:value="1170004">
                <text:p>1170004</text:p>
              </table:table-cell>
              <table:table-cell office:value-type="float" office:value="2344598">
                <text:p>2344598</text:p>
              </table:table-cell>
            </table:table-row>
            <table:table-row>
              <table:table-cell office:value-type="string">
                <text:p>Колледж 2</text:p>
              </table:table-cell>
              <table:table-cell office:value-type="float" office:value="237800">
                <text:p>237800</text:p>
              </table:table-cell>
              <table:table-cell office:value-type="float" office:value="732647">
                <text:p>732647</text:p>
              </table:table-cell>
              <table:table-cell office:value-type="float" office:value="567672">
                <text:p>567672</text:p>
              </table:table-cell>
              <table:table-cell office:value-type="float" office:value="234234">
                <text:p>234234</text:p>
              </table:table-cell>
              <table:table-cell office:value-type="float" office:value="323217">
                <text:p>323217</text:p>
              </table:table-cell>
              <table:table-cell office:value-type="float" office:value="634423">
                <text:p>634423</text:p>
              </table:table-cell>
              <table:table-cell office:value-type="float" office:value="235455">
                <text:p>235455</text:p>
              </table:table-cell>
            </table:table-row>
            <table:table-row>
              <table:table-cell office:value-type="string">
                <text:p>Колледж 3</text:p>
              </table:table-cell>
              <table:table-cell office:value-type="float" office:value="3211400">
                <text:p>3211400</text:p>
              </table:table-cell>
              <table:table-cell office:value-type="float" office:value="4873837">
                <text:p>4873837</text:p>
              </table:table-cell>
              <table:table-cell office:value-type="float" office:value="3654654">
                <text:p>3654654</text:p>
              </table:table-cell>
              <table:table-cell office:value-type="float" office:value="3453453">
                <text:p>3453453</text:p>
              </table:table-cell>
              <table:table-cell office:value-type="float" office:value="5435323">
                <text:p>5435323</text:p>
              </table:table-cell>
              <table:table-cell office:value-type="float" office:value="4586959">
                <text:p>4586959</text:p>
              </table:table-cell>
              <table:table-cell office:value-type="float" office:value="8576885">
                <text:p>8576885</text:p>
              </table:table-cell>
            </table:table-row>
            <table:table-row>
              <table:table-cell office:value-type="string">
                <text:p>Колледж 4</text:p>
              </table:table-cell>
              <table:table-cell office:value-type="float" office:value="4961201">
                <text:p>4961201</text:p>
              </table:table-cell>
              <table:table-cell office:value-type="float" office:value="7844962">
                <text:p>7844962</text:p>
              </table:table-cell>
              <table:table-cell office:value-type="float" office:value="6159094">
                <text:p>6159094</text:p>
              </table:table-cell>
              <table:table-cell office:value-type="float" office:value="8233225">
                <text:p>8233225</text:p>
              </table:table-cell>
              <table:table-cell office:value-type="float" office:value="8109432">
                <text:p>8109432</text:p>
              </table:table-cell>
              <table:table-cell office:value-type="float" office:value="6393392">
                <text:p>6393392</text:p>
              </table:table-cell>
              <table:table-cell office:value-type="float" office:value="11158945">
                <text:p>11158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